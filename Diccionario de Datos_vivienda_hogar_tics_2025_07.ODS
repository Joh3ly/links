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2.309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5_JU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tics_2025_0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<text:span text:style-name="T1"><text:s/></text:span>JULIO 2025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1</text:p>
          </table:table-cell>
          <table:table-cell office:value-type="string" table:style-name="ce7">
            <text:p>Tiene este HOGAR: COMPUTADORA DE ESCRITORIO LAPT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1</text:p>
          </table:table-cell>
          <table:table-cell office:value-type="string" table:style-name="ce7">
            <text:p>Cuántos tiene-COMPUTADORA DE ESCRITORIO LAPT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2</text:p>
          </table:table-cell>
          <table:table-cell office:value-type="string" table:style-name="ce7">
            <text:p>Tiene este HOGAR: TABLET / TABLETA TAB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2</text:p>
          </table:table-cell>
          <table:table-cell office:value-type="string" table:style-name="ce7">
            <text:p>Cuántos tiene-TABLET / TABLETA TABLE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3</text:p>
          </table:table-cell>
          <table:table-cell office:value-type="string" table:style-name="ce7">
            <text:p>Tiene este HOGAR: SERVICIO DE TELÉFONO CONVENCIO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3</text:p>
          </table:table-cell>
          <table:table-cell office:value-type="string" table:style-name="ce7">
            <text:p>Cuántos tiene-SERVICIO DE TELÉFONO CONVENCIO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4</text:p>
          </table:table-cell>
          <table:table-cell office:value-type="string" table:style-name="ce7">
            <text:p>Tiene este HOGAR: SERVICIO DE TELEFONÍA CELUL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4</text:p>
          </table:table-cell>
          <table:table-cell office:value-type="string" table:style-name="ce7">
            <text:p>Cuántos tiene-SERVICIO DE TELEFONÍA CELUL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5</text:p>
          </table:table-cell>
          <table:table-cell office:value-type="string" table:style-name="ce7">
            <text:p>Tiene este HOGAR: TELÉFONO INTELIGENTE (O SMARTPHON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5</text:p>
          </table:table-cell>
          <table:table-cell office:value-type="string" table:style-name="ce7">
            <text:p>Cuántos tiene-TELÉFONO INTELIGENTE (O SMARTPHON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16</text:p>
          </table:table-cell>
          <table:table-cell office:value-type="string" table:style-name="ce7">
            <text:p>Tiene este HOGAR: SMART TV (Televisor inteligente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qt19a026</text:p>
          </table:table-cell>
          <table:table-cell office:value-type="string" table:style-name="ce7">
            <text:p>Cuántos tiene- SMART TV (Televisor inteligente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20</text:p>
          </table:table-cell>
          <table:table-cell office:value-type="string" table:style-name="ce7">
            <text:p>Tiene este hogar ACCESO A INTERNE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JP</meta:initial-creator>
    <dc:creator>INEC Mariuxi Tutin</dc:creator>
    <meta:creation-date>2020-12-02T16:57:00Z</meta:creation-date>
    <dc:date>2025-08-20T14:49:07Z</dc:date>
  </office:meta>
</office:document-meta>
</file>